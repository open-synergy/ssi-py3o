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uli" fo:font-size="8pt" officeooo:rsid="00b3a995" officeooo:paragraph-rsid="00b3a995" style:font-size-asian="8pt" style:font-size-complex="8pt"/>
    </style:style>
    <style:style style:name="P2" style:family="paragraph" style:parent-style-name="Standard">
      <style:text-properties style:font-name="Muli" fo:font-size="8pt" officeooo:rsid="00fc8637" officeooo:paragraph-rsid="00b3a995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ext-input text:description="py3o://function=&quot;parser.hello_world()&quot;">Hello World</text:text-input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3" number:language="en" number:country="US">
      <number:day number:style="long"/>
      <number:text>/</number:text>
      <number:month number:style="long"/>
      <number:text>/</number:text>
      <number:year/>
    </number:date-style>
    <number:date-style style:name="N10124" number:language="en" number:country="US" number:title="User-defined">
      <number:day number:style="long"/>
      <number:text>/</number:text>
      <number:month number:style="long"/>
      <number:text>/</number:text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6T08:37:01.904935165</meta:creation-date>
    <dc:date>2025-08-06T12:47:24.390848040</dc:date>
    <meta:editing-duration>PT3H17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13" meta:non-whitespace-character-count="12"/>
  </office:meta>
</office:document-meta>
</file>